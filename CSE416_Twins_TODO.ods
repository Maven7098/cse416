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&quot;Liberation Sans&quot;" svg:font-family="'&quot;Liberation Sans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fo:font-size="11pt" style:font-size-asian="11pt" style:font-size-complex="11p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4c7c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calcext:value-type="string">
            <text:p>Number</text:p>
          </table:table-cell>
          <table:table-cell table:style-name="ce12" office:value-type="string" calcext:value-type="string">
            <text:p>Req Type</text:p>
          </table:table-cell>
          <table:table-cell table:style-name="ce19" office:value-type="string" calcext:value-type="string">
            <text:p>#</text:p>
          </table:table-cell>
          <table:table-cell table:style-name="ce12" office:value-type="string" calcext:value-type="string">
            <text:p>Required?</text:p>
          </table:table-cell>
          <table:table-cell table:style-name="ce12" office:value-type="string" calcext:value-type="string">
            <text:p>Status</text:p>
          </table:table-cell>
          <table:table-cell table:style-name="ce12" office:value-type="string" calcext:value-type="string">
            <text:p>Complete?</text:p>
          </table:table-cell>
          <table:table-cell table:style-name="ce43" office:value-type="string" calcext:value-type="string" table:number-columns-spanned="8" table:number-rows-spanned="1">
            <text:p>Description</text:p>
          </table:table-cell>
          <table:covered-table-cell table:number-columns-repeated="7"/>
          <table:table-cell table:style-name="ce16"/>
          <table:table-cell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Select state to display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Prepro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Integrate multiple data sources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Prepro</text:p>
          </table:table-cell>
          <table:table-cell table:style-name="ce21" office:value-type="float" office:value="4" calcext:value-type="float">
            <text:p>4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Store preprocessed data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/>
          <table:table-cell table:style-name="ce16" table:number-columns-repeated="5"/>
          <table:table-cell table:style-name="ce26" table:number-columns-spanned="9" table:number-rows-spanned="1"/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Display the current district plan when state is selected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State data summary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Prepro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Integrate enacted plan with dataset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Prepro</text:p>
          </table:table-cell>
          <table:table-cell table:style-name="ce21" office:value-type="float" office:value="12" calcext:value-type="float">
            <text:p>12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Prepare data for VRA-conscious analysis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Display Congressional representation table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7" calcext:value-type="float">
            <text:p>7</text:p>
          </table:table-cell>
          <table:table-cell table:style-name="ce12" office:value-type="string" calcext:value-type="string">
            <text:p>Prefer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Highlight district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Display demographic heat map by precinct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5" calcext:value-type="float">
            <text:p>5</text:p>
          </table:table-cell>
          <table:table-cell table:style-name="ce12" office:value-type="string" calcext:value-type="string">
            <text:p>Prefer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Display demographic heat map by census block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/>
          <table:table-cell table:style-name="ce12" table:number-columns-repeated="5"/>
          <table:table-cell table:style-name="ce26" table:number-columns-spanned="9" table:number-rows-spanned="1"/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9" calcext:value-type="float">
            <text:p>9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Display Gingles analysis results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10" calcext:value-type="float">
            <text:p>10</text:p>
          </table:table-cell>
          <table:table-cell table:style-name="ce12" office:value-type="string" calcext:value-type="string">
            <text:p>Prefer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Display the Ginels 2/3 analysis data in a tabular display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11" calcext:value-type="float">
            <text:p>11</text:p>
          </table:table-cell>
          <table:table-cell table:style-name="ce12" office:value-type="string" calcext:value-type="string">
            <text:p>Prefer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Highlight a Gingles 2/3 table row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4" office:value-type="string" calcext:value-type="string">
            <text:p>Prepro</text:p>
          </table:table-cell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Gingles 2/3 Precinct Analysis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4" office:value-type="string" calcext:value-type="string">
            <text:p>Prepro</text:p>
          </table:table-cell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Gingles 2/3 Non-Linear Regression Analysis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Display canididate results of EI analysis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14" calcext:value-type="float">
            <text:p>14</text:p>
          </table:table-cell>
          <table:table-cell table:style-name="ce12" office:value-type="string" calcext:value-type="string">
            <text:p>Prefer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Display EI precinct results in a choropleth map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15" calcext:value-type="float">
            <text:p>15</text:p>
          </table:table-cell>
          <table:table-cell table:style-name="ce12" office:value-type="string" calcext:value-type="string">
            <text:p>Prefer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Display EI KDE results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string" calcext:value-type="string">
            <text:p>Prepro</text:p>
          </table:table-cell>
          <table:table-cell table:style-name="ce21" office:value-type="float" office:value="9" calcext:value-type="float">
            <text:p>9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Use the PyEI MGGG software to calculate Ecological Inference data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4" office:value-type="string" calcext:value-type="string">
            <text:p>Prepro</text:p>
          </table:table-cell>
          <table:table-cell table:style-name="ce21" office:value-type="float" office:value="15" calcext:value-type="float">
            <text:p>15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Calculate the polarized voting percentage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/>
          <table:table-cell table:style-name="ce16" table:number-columns-repeated="5"/>
          <table:table-cell table:style-name="ce26" table:number-columns-spanned="9" table:number-rows-spanned="1"/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16" calcext:value-type="float">
            <text:p>16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Display Ensemble Splits in a bar chart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17" calcext:value-type="float">
            <text:p>17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Display Box and Whisker Data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26" calcext:value-type="float">
            <text:p>26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Display Minority-Effective and Minority-Majority Bar Charts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string" calcext:value-type="string">
            <text:p>Prepro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Identify Neighboring Precincts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5" office:value-type="string" calcext:value-type="string">
            <text:p>Seawulf</text:p>
          </table:table-cell>
          <table:table-cell table:style-name="ce22" office:value-type="float" office:value="10" calcext:value-type="float">
            <text:p>10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Calculate ensemble measures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5" office:value-type="string" calcext:value-type="string">
            <text:p>Seawulf</text:p>
          </table:table-cell>
          <table:table-cell table:style-name="ce22" office:value-type="float" office:value="11" calcext:value-type="float">
            <text:p>11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Calculate Box and Whisker Data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5" office:value-type="string" calcext:value-type="string">
            <text:p>Seawulf</text:p>
          </table:table-cell>
          <table:table-cell table:style-name="ce22" office:value-type="float" office:value="15" calcext:value-type="float">
            <text:p>15</text:p>
          </table:table-cell>
          <table:table-cell table:style-name="ce12" office:value-type="string" calcext:value-type="string">
            <text:p>Prefer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Generate additional VRA constrained ensembles with a range of thresholds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5" office:value-type="string" calcext:value-type="string">
            <text:p>Seawulf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Server dispatcher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5" office:value-type="string" calcext:value-type="string">
            <text:p>Seawulf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Run MGGG ReCom algorithm on the SeaWulf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5" office:value-type="string" calcext:value-type="string">
            <text:p>Seawulf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Run MGGG VRA Constrained ReCom algorithm on the SeaWulf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5" office:value-type="string" calcext:value-type="string">
            <text:p>Seawulf</text:p>
          </table:table-cell>
          <table:table-cell table:style-name="ce22" office:value-type="float" office:value="8" calcext:value-type="float">
            <text:p>8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Calculate the Republican/Democratic split for each random district plan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4" office:value-type="string" calcext:value-type="string">
            <text:p>Prepro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Store SeaWulf data</text:p>
          </table:table-cell>
          <table:covered-table-cell table:number-columns-repeated="8"/>
          <table:table-cell table:number-columns-repeated="16369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4" office:value-type="string" calcext:value-type="string">
            <text:p>Prepro</text:p>
          </table:table-cell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Generate data files required for SeaWulf processing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Display VRA Impact Threshold Table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21" calcext:value-type="float">
            <text:p>21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Display Minority Effectiveness Box and Whisker Data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4" office:value-type="string" calcext:value-type="string">
            <text:p>Prepro</text:p>
          </table:table-cell>
          <table:table-cell table:style-name="ce21" office:value-type="float" office:value="11" calcext:value-type="float">
            <text:p>11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Calculate Box &amp; Whisker Data for Enacted Plan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5" office:value-type="string" calcext:value-type="string">
            <text:p>Seawulf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Coordinate/aggregate SeaWulf core generated data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5" office:value-type="string" calcext:value-type="string">
            <text:p>Seawulf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Calculate election winners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5" office:value-type="string" calcext:value-type="string">
            <text:p>Seawulf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Calculate minority effectiveness score per random district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5" office:value-type="string" calcext:value-type="string">
            <text:p>Seawulf</text:p>
          </table:table-cell>
          <table:table-cell table:style-name="ce22" office:value-type="float" office:value="7" calcext:value-type="float">
            <text:p>7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Calculate minority population percentage per random district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22" calcext:value-type="float">
            <text:p>22</text:p>
          </table:table-cell>
          <table:table-cell table:style-name="ce23" office:value-type="string" calcext:value-type="string">
            <text:p>Requi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Display Minority Effectiveness Histogram</text:p>
          </table:table-cell>
          <table:covered-table-cell table:number-columns-repeated="8"/>
          <table:table-cell table:number-columns-repeated="16369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3" office:value-type="string" calcext:value-type="string">
            <text:p>GUI</text:p>
          </table:table-cell>
          <table:table-cell table:style-name="ce20" office:value-type="float" office:value="23" calcext:value-type="float">
            <text:p>23</text:p>
          </table:table-cell>
          <table:table-cell table:style-name="ce12" office:value-type="string" calcext:value-type="string">
            <text:p>Preferred</text:p>
          </table:table-cell>
          <table:table-cell table:style-name="ce12" office:value-type="string" calcext:value-type="string">
            <text:p>Complet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 table:number-columns-spanned="9" table:number-rows-spanned="1">
            <text:p>Reset Page</text:p>
          </table:table-cell>
          <table:covered-table-cell table:number-columns-repeated="8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2">
          <table:table-cell table:style-name="ce16" table:number-columns-repeated="3"/>
          <table:table-cell table:style-name="ce16" office:value-type="string" calcext:value-type="string">
            <text:p>Total Complete</text:p>
          </table:table-cell>
          <table:table-cell table:style-name="ce24" office:value-type="float" office:value="43" calcext:value-type="float">
            <text:p>43</text:p>
          </table:table-cell>
          <table:table-cell table:style-name="ce16" table:number-columns-repeated="6"/>
          <table:table-cell table:number-columns-repeated="16373"/>
        </table:table-row>
        <table:table-row table:style-name="ro2" table:number-rows-repeated="4">
          <table:table-cell table:number-columns-repeated="16384"/>
        </table:table-row>
        <table:table-row table:style-name="ro1">
          <table:table-cell table:style-name="ce16" table:number-columns-repeated="5"/>
          <table:table-cell table:style-name="ce26" table:number-columns-spanned="9" table:number-rows-spanned="1"/>
          <table:covered-table-cell table:number-columns-repeated="8"/>
          <table:table-cell table:number-columns-repeated="16370"/>
        </table:table-row>
        <table:table-row table:style-name="ro2" table:number-rows-repeated="20">
          <table:table-cell table:number-columns-repeated="16384"/>
        </table:table-row>
        <table:table-row table:style-name="ro1">
          <table:table-cell table:style-name="ce16" table:number-columns-repeated="5"/>
          <table:table-cell table:style-name="ce26" table:number-columns-spanned="9" table:number-rows-spanned="1"/>
          <table:covered-table-cell table:number-columns-repeated="8"/>
          <table:table-cell table:number-columns-repeated="16370"/>
        </table:table-row>
        <table:table-row table:style-name="ro2" table:number-rows-repeated="8">
          <table:table-cell table:number-columns-repeated="16384"/>
        </table:table-row>
        <table:table-row table:style-name="ro1" table:number-rows-repeated="2">
          <table:table-cell table:style-name="ce16" table:number-columns-repeated="14"/>
          <table:table-cell table:number-columns-repeated="16370"/>
        </table:table-row>
        <table:table-row table:style-name="ro1">
          <table:table-cell table:number-columns-repeated="11"/>
          <table:table-cell table:style-name="ce16" table:number-columns-repeated="3"/>
          <table:table-cell table:number-columns-repeated="16370"/>
        </table:table-row>
        <table:table-row table:style-name="ro2" table:number-rows-repeated="104848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&quot;Liberation Sans&quot;" svg:font-family="'&quot;Liberation Sans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Libertinus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8">00/00/0000</text:date>, <text:time style:data-style-name="N2" text:time-value="19:26:10.6442663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6-05-18T19:30:27.795037084</dc:date>
    <meta:editing-duration>PT8M25S</meta:editing-duration>
    <meta:editing-cycles>3</meta:editing-cycles>
    <meta:document-statistic meta:table-count="1" meta:cell-count="310" meta:object-count="0"/>
  </office:meta>
</office:document-meta>
</file>