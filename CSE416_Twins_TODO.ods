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2937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0.7874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010" table:default-cell-style-name="ce1"/>
        <table:table-column table:style-name="co9" table:number-columns-repeated="15360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ce12" office:value-type="string" calcext:value-type="string">
            <text:p>Req Type</text:p>
          </table:table-cell>
          <table:table-cell table:style-name="ce19" office:value-type="string" calcext:value-type="string">
            <text:p>#</text:p>
          </table:table-cell>
          <table:table-cell table:style-name="ce12" office:value-type="string" calcext:value-type="string">
            <text:p>Required?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Complete?</text:p>
          </table:table-cell>
          <table:table-cell office:value-type="string" calcext:value-type="string" table:number-columns-spanned="5" table:number-rows-spanned="1">
            <text:p>Description</text:p>
          </table:table-cell>
          <table:covered-table-cell table:number-columns-repeated="4"/>
          <table:table-cell table:number-columns-repeated="3"/>
          <table:table-cell table:style-name="ce16"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elect state to display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ntegrate multiple data sources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tore preprocessed data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/>
          <table:table-cell table:style-name="ce16" table:number-columns-repeated="5"/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the current district plan when state is selected</text:p>
          </table:table-cell>
          <table:covered-table-cell table:number-columns-repeated="4" office:value-type="string" calcext:value-type="string">
            <text:p>Display the current district plan when state is selected</text:p>
          </table:covered-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tate data summary</text:p>
          </table:table-cell>
          <table:covered-table-cell table:number-columns-repeated="4" office:value-type="string" calcext:value-type="string">
            <text:p>State data summary</text:p>
          </table:covered-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ntegrate enacted plan with dataset</text:p>
          </table:table-cell>
          <table:covered-table-cell table:number-columns-repeated="4" office:value-type="string" calcext:value-type="string">
            <text:p>Integrate enacted plan with dataset</text:p>
          </table:covered-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Prepare data for VRA-conscious analysis</text:p>
          </table:table-cell>
          <table:covered-table-cell table:number-columns-repeated="4" office:value-type="string" calcext:value-type="string">
            <text:p>Prepare data for VRA-conscious analysis</text:p>
          </table:covered-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Congressional representation table</text:p>
          </table:table-cell>
          <table:covered-table-cell table:number-columns-repeated="4" office:value-type="string" calcext:value-type="string">
            <text:p>Display Congressional representation table</text:p>
          </table:covered-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7" calcext:value-type="float">
            <text:p>7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Highlight district</text:p>
          </table:table-cell>
          <table:covered-table-cell table:number-columns-repeated="4" office:value-type="string" calcext:value-type="string">
            <text:p>Highlight district</text:p>
          </table:covered-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demographic heat map by precinct</text:p>
          </table:table-cell>
          <table:covered-table-cell table:number-columns-repeated="4" office:value-type="string" calcext:value-type="string">
            <text:p>Display demographic heat map by precinct</text:p>
          </table:covered-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5" calcext:value-type="float">
            <text:p>5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demographic heat map by census block</text:p>
          </table:table-cell>
          <table:covered-table-cell table:number-columns-repeated="4" office:value-type="string" calcext:value-type="string">
            <text:p>Display demographic heat map by census block</text:p>
          </table:covered-table-cell>
          <table:table-cell table:number-columns-repeated="16373"/>
        </table:table-row>
        <table:table-row table:style-name="ro1">
          <table:table-cell/>
          <table:table-cell table:style-name="ce12" table:number-columns-repeated="5"/>
          <table:table-cell table:number-columns-spanned="5" table:number-rows-spanned="1"/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Gingles analysis results</text:p>
          </table:table-cell>
          <table:covered-table-cell table:number-columns-repeated="4" office:value-type="string" calcext:value-type="string">
            <text:p>Display Gingles analysis results</text:p>
          </table:covered-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0" calcext:value-type="float">
            <text:p>10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the Ginels 2/3 analysis data in a tabular display</text:p>
          </table:table-cell>
          <table:covered-table-cell table:number-columns-repeated="4" office:value-type="string" calcext:value-type="string">
            <text:p>Display the Ginels 2/3 analysis data in a tabular display</text:p>
          </table:covered-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1" calcext:value-type="float">
            <text:p>11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Highlight a Gingles 2/3 table row</text:p>
          </table:table-cell>
          <table:covered-table-cell table:number-columns-repeated="4" office:value-type="string" calcext:value-type="string">
            <text:p>Highlight a Gingles 2/3 table row</text:p>
          </table:covered-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Gingles 2/3 Precinct Analysis</text:p>
          </table:table-cell>
          <table:covered-table-cell table:number-columns-repeated="4" office:value-type="string" calcext:value-type="string">
            <text:p>Gingles 2/3 Precinct Analysis</text:p>
          </table:covered-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Gingles 2/3 Non-Linear Regression Analysis</text:p>
          </table:table-cell>
          <table:covered-table-cell table:number-columns-repeated="4" office:value-type="string" calcext:value-type="string">
            <text:p>Gingles 2/3 Non-Linear Regression Analysis</text:p>
          </table:covered-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canididate results of EI analysis</text:p>
          </table:table-cell>
          <table:covered-table-cell table:number-columns-repeated="4" office:value-type="string" calcext:value-type="string">
            <text:p>Display canididate results of EI analysis</text:p>
          </table:covered-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4" calcext:value-type="float">
            <text:p>14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EI precinct results in a choropleth map</text:p>
          </table:table-cell>
          <table:covered-table-cell table:number-columns-repeated="4" office:value-type="string" calcext:value-type="string">
            <text:p>Display EI precinct results in a choropleth map</text:p>
          </table:covered-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5" calcext:value-type="float">
            <text:p>15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EI KDE results</text:p>
          </table:table-cell>
          <table:covered-table-cell table:number-columns-repeated="4" office:value-type="string" calcext:value-type="string">
            <text:p>Display EI KDE results</text:p>
          </table:covered-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Use the PyEI MGGG software to calculate EI data</text:p>
          </table:table-cell>
          <table:covered-table-cell table:number-columns-repeated="4" office:value-type="string" calcext:value-type="string">
            <text:p>Use the PyEI MGGG software to calculate Ecological Inference data</text:p>
          </table:covered-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alculate the polarized voting percentage</text:p>
          </table:table-cell>
          <table:covered-table-cell table:number-columns-repeated="4" office:value-type="string" calcext:value-type="string">
            <text:p>Calculate the polarized voting percentage</text:p>
          </table:covered-table-cell>
          <table:table-cell table:number-columns-repeated="16373"/>
        </table:table-row>
        <table:table-row table:style-name="ro1">
          <table:table-cell/>
          <table:table-cell table:style-name="ce16" table:number-columns-repeated="5"/>
          <table:table-cell table:number-columns-spanned="5" table:number-rows-spanned="1"/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VRA Impact Threshold Table</text:p>
          </table:table-cell>
          <table:covered-table-cell table:number-columns-repeated="4" office:value-type="string" calcext:value-type="string">
            <text:p>Display VRA Impact Threshold Table</text:p>
          </table:covered-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Minority Effectiveness Box and Whisker Data</text:p>
          </table:table-cell>
          <table:covered-table-cell table:number-columns-repeated="4" office:value-type="string" calcext:value-type="string">
            <text:p>Display Minority Effectiveness Box and Whisker Data</text:p>
          </table:covered-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alculate Box &amp; Whisker Data for Enacted Plan</text:p>
          </table:table-cell>
          <table:covered-table-cell table:number-columns-repeated="4" office:value-type="string" calcext:value-type="string">
            <text:p>Calculate Box &amp; Whisker Data for Enacted Plan</text:p>
          </table:covered-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oordinate/aggregate SeaWulf core generated data</text:p>
          </table:table-cell>
          <table:covered-table-cell table:number-columns-repeated="4" office:value-type="string" calcext:value-type="string">
            <text:p>Coordinate/aggregate SeaWulf core generated data</text:p>
          </table:covered-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alculate election winners</text:p>
          </table:table-cell>
          <table:covered-table-cell table:number-columns-repeated="4" office:value-type="string" calcext:value-type="string">
            <text:p>Calculate election winners</text:p>
          </table:covered-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alculate minority effectiveness score per random district</text:p>
          </table:table-cell>
          <table:covered-table-cell table:number-columns-repeated="4" office:value-type="string" calcext:value-type="string">
            <text:p>Calculate minority effectiveness score per random district</text:p>
          </table:covered-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Calculate minority population percentage per random district</text:p>
          </table:table-cell>
          <table:covered-table-cell table:number-columns-repeated="4" office:value-type="string" calcext:value-type="string">
            <text:p>Calculate minority population percentage per random district</text:p>
          </table:covered-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Display Minority Effectiveness Histogram</text:p>
          </table:table-cell>
          <table:covered-table-cell table:number-columns-repeated="4" office:value-type="string" calcext:value-type="string">
            <text:p>Display Minority Effectiveness Histogram</text:p>
          </table:covered-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3" calcext:value-type="float">
            <text:p>23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Reset Page</text:p>
          </table:table-cell>
          <table:covered-table-cell table:number-columns-repeated="4" office:value-type="string" calcext:value-type="string">
            <text:p>Reset Page</text:p>
          </table:covered-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style-name="ce16" table:number-columns-repeated="4"/>
          <table:table-cell table:style-name="ce24"/>
          <table:table-cell table:style-name="ce16" table:number-columns-repeated="6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1"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70"/>
        </table:table-row>
        <table:table-row table:style-name="ro2" table:number-rows-repeated="20">
          <table:table-cell table:number-columns-repeated="16384"/>
        </table:table-row>
        <table:table-row table:style-name="ro1"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70"/>
        </table:table-row>
        <table:table-row table:style-name="ro2" table:number-rows-repeated="8">
          <table:table-cell table:number-columns-repeated="16384"/>
        </table:table-row>
        <table:table-row table:style-name="ro1" table:number-rows-repeated="2">
          <table:table-cell table:style-name="ce16" table:number-columns-repeated="14"/>
          <table:table-cell table:number-columns-repeated="16370"/>
        </table:table-row>
        <table:table-row table:style-name="ro1">
          <table:table-cell table:number-columns-repeated="11"/>
          <table:table-cell table:style-name="ce16" table:number-columns-repeated="3"/>
          <table:table-cell table:number-columns-repeated="16370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tin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20:11:18.608784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5-18T20:18:08.682035288</dc:date>
    <meta:editing-duration>PT13M34S</meta:editing-duration>
    <meta:editing-cycles>6</meta:editing-cycles>
    <meta:print-date>2026-05-18T20:16:03.015202583</meta:print-date>
    <meta:printed-by>PDF files</meta:printed-by>
    <meta:document-statistic meta:table-count="1" meta:cell-count="325" meta:object-count="0"/>
  </office:meta>
</office:document-meta>
</file>