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34in" table:align="center" style:writing-mode="lr-tb"/>
    </style:style>
    <style:style style:name="Table1.A" style:family="table-column">
      <style:table-column-properties style:column-width="1.484in"/>
    </style:style>
    <style:style style:name="Table1.B" style:family="table-column">
      <style:table-column-properties style:column-width="4.85in"/>
    </style:style>
    <style:style style:name="Table1.1" style:family="table-row">
      <style:table-row-properties style:min-row-height="0.1347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188in" fo:keep-together="auto"/>
    </style:style>
    <style:style style:name="Table1.3" style:family="table-row">
      <style:table-row-properties style:min-row-height="0.2097in" fo:keep-together="auto"/>
    </style:style>
    <style:style style:name="Table1.4" style:family="table-row">
      <style:table-row-properties style:min-row-height="0.4243in" fo:keep-together="auto"/>
    </style:style>
    <style:style style:name="Table1.8" style:family="table-row">
      <style:table-row-properties style:min-row-height="0.1368in" fo:keep-together="auto"/>
    </style:style>
    <style:style style:name="Table1.9" style:family="table-row">
      <style:table-row-properties style:min-row-height="0.2285in" fo:keep-together="auto"/>
    </style:style>
    <style:style style:name="P1" style:family="paragraph" style:parent-style-name="Heading">
      <style:text-properties style:font-name="Libertinus Sans" fo:font-size="18pt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Libertinus Sans"/>
    </style:style>
    <style:style style:name="P3" style:family="paragraph" style:parent-style-name="Standard">
      <style:paragraph-properties style:snap-to-layout-grid="false"/>
      <style:text-properties style:font-name="Libertinus Sans" officeooo:rsid="001db5d9" officeooo:paragraph-rsid="001db5d9"/>
    </style:style>
    <style:style style:name="P4" style:family="paragraph" style:parent-style-name="Standard">
      <style:paragraph-properties fo:text-align="end" style:justify-single-word="false"/>
      <style:text-properties style:font-name="Libertinus Sans" fo:font-style="italic" style:font-style-asian="italic"/>
    </style:style>
    <style:style style:name="P5" style:family="paragraph" style:parent-style-name="Standard">
      <style:text-properties style:font-name="Libertinus Sans" officeooo:rsid="00255f09" officeooo:paragraph-rsid="00255f09"/>
    </style:style>
    <style:style style:name="P6" style:family="paragraph" style:parent-style-name="Standard">
      <style:paragraph-properties fo:text-align="end" style:justify-single-word="false"/>
      <style:text-properties style:font-name="Libertinus Sans" fo:font-style="italic" officeooo:rsid="00227e4b" officeooo:paragraph-rsid="00227e4b" style:font-style-asian="italic" style:font-style-complex="italic"/>
    </style:style>
    <style:style style:name="P7" style:family="paragraph" style:parent-style-name="Standard">
      <style:paragraph-properties style:snap-to-layout-grid="false"/>
      <style:text-properties style:font-name="Libertinus Sans" officeooo:rsid="002aa0b0" officeooo:paragraph-rsid="002aa0b0"/>
    </style:style>
    <style:style style:name="P8" style:family="paragraph" style:parent-style-name="Standard" style:list-style-name="WW8Num25">
      <style:text-properties style:font-name="Libertinus Sans" officeooo:rsid="001db5d9"/>
    </style:style>
    <style:style style:name="P9" style:family="paragraph" style:parent-style-name="Standard" style:list-style-name="WW8Num25">
      <style:text-properties style:font-name="Libertinus Sans" officeooo:rsid="002aa0b0" officeooo:paragraph-rsid="002aa0b0"/>
    </style:style>
    <style:style style:name="P10" style:family="paragraph" style:parent-style-name="Standard" style:list-style-name="WW8Num13">
      <style:text-properties style:font-name="Libertinus Sans"/>
    </style:style>
    <style:style style:name="P11" style:family="paragraph" style:parent-style-name="Standard" style:list-style-name="WW8Num13">
      <style:text-properties style:font-name="Libertinus Sans" officeooo:rsid="00268983" officeooo:paragraph-rsid="00268983"/>
    </style:style>
    <style:style style:name="P12" style:family="paragraph" style:parent-style-name="Standard" style:list-style-name="WW8Num13">
      <style:text-properties style:font-name="Libertinus Sans" officeooo:rsid="002d64eb" officeooo:paragraph-rsid="002d64eb"/>
    </style:style>
    <style:style style:name="P13" style:family="paragraph" style:parent-style-name="Standard">
      <style:paragraph-properties fo:text-align="end" style:justify-single-word="false"/>
      <style:text-properties style:font-name="Libertinus Sans" fo:font-style="italic" officeooo:rsid="00227e4b" officeooo:paragraph-rsid="00227e4b" style:font-style-asian="italic"/>
    </style:style>
    <style:style style:name="P14" style:family="paragraph" style:parent-style-name="Standard">
      <style:text-properties style:font-name="Libertinus Sans" officeooo:rsid="002d0627" officeooo:paragraph-rsid="002d0627"/>
    </style:style>
    <style:style style:name="P15" style:family="paragraph" style:parent-style-name="Standard" style:list-style-name="WW8Num14">
      <style:text-properties style:font-name="Libertinus Sans" officeooo:rsid="00236cee" officeooo:paragraph-rsid="00236cee"/>
    </style:style>
    <style:style style:name="P16" style:family="paragraph" style:parent-style-name="Standard">
      <style:text-properties style:font-name="Libertinus Sans" officeooo:rsid="00268983" officeooo:paragraph-rsid="00227e4b"/>
    </style:style>
    <style:style style:name="T1" style:family="text">
      <style:text-properties officeooo:rsid="0026c2af"/>
    </style:style>
    <style:style style:name="T2" style:family="text">
      <style:text-properties officeooo:rsid="002b26b9"/>
    </style:style>
    <style:style style:name="T3" style:family="text">
      <style:text-properties officeooo:rsid="00275ef1"/>
    </style:style>
    <style:style style:name="T4" style:family="text">
      <style:text-properties officeooo:rsid="00255f09"/>
    </style:style>
    <style:style style:name="T5" style:family="text">
      <style:text-properties officeooo:rsid="002aa0b0"/>
    </style:style>
    <style:style style:name="T6" style:family="text">
      <style:text-properties officeooo:rsid="001db5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se Case Template – CSE416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Use-case:</text:p>
          </table:table-cell>
          <table:table-cell table:style-name="Table1.A1" office:value-type="string">
            <text:p text:style-name="P3">GUI-<text:span text:style-name="T1">1</text:span><text:span text:style-name="T2">7</text:span> (Display box &amp; whisker data)</text:p>
          </table:table-cell>
        </table:table-row>
        <table:table-row table:style-name="Table1.2">
          <table:table-cell table:style-name="Table1.A1" office:value-type="string">
            <text:p text:style-name="P2">Primary actor:</text:p>
          </table:table-cell>
          <table:table-cell table:style-name="Table1.A1" office:value-type="string">
            <text:p text:style-name="P3">User</text:p>
          </table:table-cell>
        </table:table-row>
        <table:table-row table:style-name="Table1.3">
          <table:table-cell table:style-name="Table1.A1" office:value-type="string">
            <text:p text:style-name="P2">Goal in context:</text:p>
            <text:p text:style-name="P4">one sentence description</text:p>
          </table:table-cell>
          <table:table-cell table:style-name="Table1.A1" office:value-type="string">
            <text:p text:style-name="P5">Display <text:span text:style-name="T3">the </text:span><text:span text:style-name="T2">box and whisker data to </text:span><text:span text:style-name="T3">allow the user to make a comparison </text:span><text:span text:style-name="T2">between the race-blind and VRA-compliant ensembles</text:span><text:span text:style-name="T3">.</text:span></text:p>
          </table:table-cell>
        </table:table-row>
        <table:table-row table:style-name="Table1.4">
          <table:table-cell table:style-name="Table1.A1" office:value-type="string">
            <text:p text:style-name="P2">Preconditions:</text:p>
            <text:p text:style-name="P6">Only needs to be at a high level, does not cover everything between Client and Server</text:p>
          </table:table-cell>
          <table:table-cell table:style-name="Table1.A1" office:value-type="string">
            <text:p text:style-name="P7">The primary actor selects a state (as stated in GUI-2)</text:p>
          </table:table-cell>
        </table:table-row>
        <table:table-row table:style-name="Table1.4"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7">The primary actor selects Proposed Districts from a navbar; <text:span text:style-name="T2">as this is the first item shown on the page, no further action is required.</text:span></text:p>
          </table:table-cell>
        </table:table-row>
        <table:table-row table:style-name="Table1.4">
          <table:table-cell table:style-name="Table1.A1" office:value-type="string">
            <text:p text:style-name="P2">Scenario:</text:p>
            <text:p text:style-name="P4">step by step actions taken by the system to achieve goal in context</text:p>
          </table:table-cell>
          <table:table-cell table:style-name="Table1.A1" office:value-type="string">
            <text:list text:style-name="WW8Num25">
              <text:list-item>
                <text:p text:style-name="P8">The primary actor selects <text:span text:style-name="T4">Racial Polarization from the </text:span><text:span text:style-name="T5">navbar</text:span> (from the Trigger)</text:p>
              </text:list-item>
              <text:list-item>
                <text:p text:style-name="P9">The client-side code requests the ensemble chart data from the server.</text:p>
              </text:list-item>
              <text:list-item>
                <text:p text:style-name="P9">The server loads the ensemble chart data from the database.</text:p>
              </text:list-item>
              <text:list-item>
                <text:p text:style-name="P9">The server sends the chart data to the client.</text:p>
              </text:list-item>
              <text:list-item>
                <text:p text:style-name="P9">The client renders the chart into a chart for the <text:span text:style-name="T2">box and whisker charts</text:span>.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">Exceptions:</text:p>
            <text:p text:style-name="P4">Special cases that involve deviations from scenario above</text:p>
          </table:table-cell>
          <table:table-cell table:style-name="Table1.A1" office:value-type="string">
            <text:list text:style-name="WW8Num13">
              <text:list-item>
                <text:p text:style-name="P10"><text:s/><text:span text:style-name="T6">The user may try to type the name of the state (or a random value) in the URL instead of clicking within the confines of the GUI</text:span></text:p>
                <text:list>
                  <text:list-item>
                    <text:p text:style-name="P11">This is not applicable to racial/ethnic categories as that is not defined as part of the URL</text:p>
                  </text:list-item>
                </text:list>
              </text:list-item>
              <text:list-item>
                <text:p text:style-name="P12">The server and client connection is cut</text:p>
                <text:list>
                  <text:list-item>
                    <text:p text:style-name="P12">Do not render any data, but should not crash</text:p>
                  </text:list-item>
                </text:list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">Priority:</text:p>
            <text:p text:style-name="P4">Build number (with reasons)</text:p>
            <text:p text:style-name="P13">You need to include actions that are already included in the GUI or C/S reviews</text:p>
          </table:table-cell>
          <table:table-cell table:style-name="Table1.A1" office:value-type="string">
            <text:p text:style-name="P14">Build 1: Basic functionality required by the client, and should be available as soon as possible</text:p>
          </table:table-cell>
        </table:table-row>
        <table:table-row table:style-name="Table1.9">
          <table:table-cell table:style-name="Table1.A1" office:value-type="string">
            <text:p text:style-name="P2">Open issues:</text:p>
            <text:p text:style-name="P4">List of open interface questions or unresolved issues</text:p>
          </table:table-cell>
          <table:table-cell table:style-name="Table1.A1" office:value-type="string">
            <text:list text:style-name="WW8Num14">
              <text:list-item>
                <text:p text:style-name="P15">Should the database be a SQL or not? If not, what type of NoSQL DB should be employed?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chapter">
      <style:paragraph-properties fo:margin-top="0in" fo:margin-bottom="0.1665in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7z0" style:family="text"/>
    <style:style style:name="WW8Num19z0" style:family="text">
      <style:text-properties fo:font-size="12pt" style:font-size-asian="12pt"/>
    </style:style>
    <style:style style:name="WW8Num19z1" style:family="text"/>
    <style:style style:name="WW8Num20z0" style:family="text">
      <style:text-properties fo:font-size="12pt" style:font-size-asian="12pt"/>
    </style:style>
    <style:style style:name="WW8Num20z1" style:family="text"/>
    <style:style style:name="WW8Num21z0" style:family="text">
      <style:text-properties fo:font-size="12pt" style:font-size-asian="12pt"/>
    </style:style>
    <style:style style:name="WW8Num21z1" style:family="text"/>
    <style:style style:name="WW8Num23z0" style:family="text">
      <style:text-properties fo:font-size="12pt" style:font-size-asian="12pt"/>
    </style:style>
    <style:style style:name="WW8Num23z1" style:family="text"/>
    <style:style style:name="WW8Num2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31z0" style:family="text">
      <style:text-properties fo:font-size="12pt" style:font-size-asian="12pt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Use-case:</dc:title>
    <dc:subject/>
    <meta:keyword/>
    <meta:initial-creator>Computer Science Department</meta:initial-creator>
    <meta:creation-date>2021-09-28T17:38:00</meta:creation-date>
    <dc:date>2026-03-23T13:24:39.351705333</dc:date>
    <meta:print-date>2007-03-17T13:59:00</meta:print-date>
    <meta:editing-cycles>16</meta:editing-cycles>
    <meta:editing-duration>PT1H11M29S</meta:editing-duration>
    <meta:generator>LibreOffice/25.2.3.2$Linux_X86_64 LibreOffice_project/520$Build-2</meta:generator>
    <meta:document-statistic meta:table-count="1" meta:image-count="0" meta:object-count="0" meta:page-count="1" meta:paragraph-count="33" meta:word-count="305" meta:character-count="1705" meta:non-whitespace-character-count="1441"/>
  </office:meta>
</office:document-meta>
</file>